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865cm" fo:min-width="7.743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915cm" fo:min-width="7.793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2.074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4" style:family="graphic" style:parent-style-name="standard" style:list-style-name="L1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2.074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5" style:family="graphic" style:parent-style-name="standard" style:list-style-name="L1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2.074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6" style:family="graphic" style:parent-style-name="standard" style:list-style-name="L1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2.074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7" style:family="graphic" style:parent-style-name="objectwithoutfill">
      <style:graphic-properties svg:stroke-color="#1b1b1b" draw:marker-end="Arrowheads_20_1" draw:marker-end-width="0.3cm" draw:fill="none" draw:textarea-vertical-align="middle"/>
    </style:style>
    <style:style style:name="gr8" style:family="graphic" style:parent-style-name="objectwithoutfill">
      <style:graphic-properties svg:stroke-color="#1b1b1b" draw:marker-end="Arrowheads_20_2" draw:marker-end-width="0.3cm" draw:fill="none" draw:textarea-vertical-align="middle"/>
    </style:style>
    <style:style style:name="gr9" style:family="graphic" style:parent-style-name="standard">
      <style:graphic-properties svg:stroke-color="#1b1b1b" draw:fill-color="#000000" draw:textarea-horizontal-align="justify" draw:textarea-vertical-align="middle" draw:auto-grow-height="false" fo:min-height="0cm" fo:min-width="0cm" fo:wrap-option="wrap" draw:shadow="hidden"/>
    </style:style>
    <style:style style:name="P1" style:family="paragraph">
      <style:paragraph-properties fo:text-align="center"/>
      <style:text-properties style:font-name="DejaVu Math TeX Gyre"/>
    </style:style>
    <style:style style:name="P2" style:family="paragraph">
      <loext:graphic-properties draw:fill="solid" draw:fill-color="#ffffff"/>
      <style:paragraph-properties fo:text-align="center"/>
      <style:text-properties style:font-name="DejaVu Math TeX Gyre"/>
    </style:style>
    <style:style style:name="P3" style:family="paragraph">
      <style:paragraph-properties fo:text-align="center"/>
      <style:text-properties style:font-name="DejaVu Math TeX Gyre" fo:font-size="16pt"/>
    </style:style>
    <style:style style:name="P4" style:family="paragraph">
      <loext:graphic-properties draw:fill="solid" draw:fill-color="#ffffff"/>
      <style:paragraph-properties fo:text-align="center"/>
      <style:text-properties style:text-position="-8% 58%" style:font-name="DejaVu Math TeX Gyre" fo:font-size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DejaVu Math TeX Gyre" fo:font-size="16pt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font-name="DejaVu Math TeX Gyre" fo:font-size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style:text-position="-8% 58%" fo:font-size="16pt"/>
    </style:style>
    <style:style style:name="T3" style:family="text">
      <style:text-properties style:text-position="0% 100%" fo:font-size="16pt"/>
    </style:style>
    <style:style style:name="T4" style:family="text">
      <style:text-properties style:font-name="DejaVu Math TeX Gyre" fo:font-size="16pt"/>
    </style:style>
    <style:style style:name="T5" style:family="text">
      <style:text-properties style:text-position="-8% 58%" style:font-name="DejaVu Math TeX Gyre" fo:font-size="16pt"/>
    </style:style>
    <style:style style:name="T6" style:family="text">
      <style:text-properties style:text-position="0% 100%" style:font-name="DejaVu Math TeX Gyre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345cm" svg:height="3.217cm" svg:x="6.307cm" svg:y="4.768cm">
          <text:p text:style-name="P1">5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345cm" svg:height="3.217cm" svg:x="6.307cm" svg:y="10.483cm">
          <text:p text:style-name="P1">DA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26cm" svg:height="1.27cm" svg:x="1.952cm" svg:y="17.192cm">
          <text:p text:style-name="P3"><text:span text:style-name="T1">I</text:span><text:span text:style-name="T2">-,1</text:span><text:span text:style-name="T3">,I</text:span><text:span text:style-name="T2">+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626cm" svg:height="1.27cm" svg:x="5.687cm" svg:y="17.192cm">
          <text:p text:style-name="P5"><text:span text:style-name="T4">I</text:span><text:span text:style-name="T5">-,2</text:span><text:span text:style-name="T6">,I</text:span><text:span text:style-name="T5">+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626cm" svg:height="1.27cm" svg:x="12.897cm" svg:y="17.192cm">
          <text:p text:style-name="P5"><text:span text:style-name="T4">I</text:span><text:span text:style-name="T5">-,i-1</text:span><text:span text:style-name="T6">,I</text:span><text:span text:style-name="T5">+,i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626cm" svg:height="1.27cm" svg:x="16.471cm" svg:y="17.192cm">
          <text:p text:style-name="P5"><text:span text:style-name="T4">I</text:span><text:span text:style-name="T5">-,i</text:span><text:span text:style-name="T6">,I</text:span><text:span text:style-name="T5">+,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0.525cm" svg:y1="7.985cm" svg:x2="10.525cm" svg:y2="10.525cm">
          <text:p/>
        </draw:line>
        <draw:line draw:style-name="gr8" draw:text-style-name="P7" draw:layer="layout" svg:x1="10.525cm" svg:y1="13.7cm" svg:x2="3.54cm" svg:y2="17.192cm">
          <text:p/>
        </draw:line>
        <draw:line draw:style-name="gr8" draw:text-style-name="P7" draw:layer="layout" svg:x1="10.526cm" svg:y1="13.726cm" svg:x2="7.032cm" svg:y2="17.192cm">
          <text:p/>
        </draw:line>
        <draw:line draw:style-name="gr8" draw:text-style-name="P7" draw:layer="layout" svg:x1="10.525cm" svg:y1="13.7cm" svg:x2="14.335cm" svg:y2="17.192cm">
          <text:p/>
        </draw:line>
        <draw:line draw:style-name="gr8" draw:text-style-name="P7" draw:layer="layout" svg:x1="10.525cm" svg:y1="13.7cm" svg:x2="17.827cm" svg:y2="17.192cm">
          <text:p/>
        </draw:line>
        <draw:path draw:style-name="gr9" draw:text-style-name="P8" draw:layer="layout" svg:width="2.714cm" svg:height="0.317cm" svg:x="9.302cm" svg:y="17.668cm" svg:viewBox="0 0 2715 318" svg:d="M318 159c0 28-7 55-21 80-14 24-34 44-58 58-25 14-52 21-80 21s-55-7-79-21c-25-14-45-34-59-58-14-25-21-52-21-80s7-55 21-79c14-25 34-45 59-59 24-14 51-21 79-21s55 7 80 21c24 14 44 34 58 59 14 24 21 51 21 79zM1516 159c0 28-7 55-21 80-14 24-34 44-58 58-25 14-52 21-80 21s-55-7-79-21c-25-14-45-34-59-58-14-25-21-52-21-80s7-55 21-79c14-25 34-45 59-59 24-14 51-21 79-21s55 7 80 21c24 14 44 34 58 59 14 24 21 51 21 79zM2715 159c0 28-7 55-21 80-14 24-34 44-58 58-25 14-52 21-80 21s-55-7-79-21c-25-14-45-34-59-58-14-25-21-52-21-80s7-55 21-79c14-25 34-45 59-59 24-14 51-21 79-21s55 7 80 21c24 14 44 34 58 59 14 24 21 51 21 79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21T11:38:18.112047823</meta:creation-date>
    <dc:date>2026-01-21T12:02:11.863878901</dc:date>
    <meta:editing-duration>PT13M22S</meta:editing-duration>
    <meta:editing-cycles>2</meta:editing-cycles>
    <meta:generator>LibreOffice/7.3.7.2$Linux_X86_64 LibreOffice_project/30$Build-2</meta:generator>
    <meta:document-statistic meta:object-count="12"/>
  </office:meta>
</office:document-meta>
</file>